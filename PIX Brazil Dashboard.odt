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2">
      <style:paragraph-properties fo:margin-top="0cm" fo:margin-bottom="0cm"/>
    </style:style>
    <style:style style:name="P15" style:family="paragraph" style:parent-style-name="Text_20_body" style:list-style-name="L3">
      <style:paragraph-properties fo:margin-top="0cm" fo:margin-bottom="0cm"/>
    </style:style>
    <style:style style:name="P16" style:family="paragraph" style:parent-style-name="Text_20_body" style:list-style-name="L4">
      <style:paragraph-properties fo:margin-top="0cm" fo:margin-bottom="0cm"/>
    </style:style>
    <style:style style:name="P17" style:family="paragraph" style:parent-style-name="Text_20_body" style:list-style-name="L5">
      <style:paragraph-properties fo:margin-top="0cm" fo:margin-bottom="0cm"/>
    </style:style>
    <style:style style:name="P18" style:family="paragraph" style:parent-style-name="Text_20_body" style:list-style-name="L6">
      <style:paragraph-properties fo:margin-top="0cm" fo:margin-bottom="0cm"/>
    </style:style>
    <style:style style:name="P19" style:family="paragraph" style:parent-style-name="Text_20_body" style:list-style-name="L7">
      <style:paragraph-properties fo:margin-top="0cm" fo:margin-bottom="0cm"/>
    </style:style>
    <style:style style:name="P20" style:family="paragraph" style:parent-style-name="Text_20_body" style:list-style-name="L8">
      <style:paragraph-properties fo:margin-top="0cm" fo:margin-bottom="0cm"/>
    </style:style>
    <style:style style:name="P21" style:family="paragraph" style:parent-style-name="Text_20_body" style:list-style-name="L9">
      <style:paragraph-properties fo:margin-top="0cm" fo:margin-bottom="0cm"/>
    </style:style>
    <style:style style:name="P22" style:family="paragraph" style:parent-style-name="Text_20_body" style:list-style-name="L10">
      <style:paragraph-properties fo:margin-top="0cm" fo:margin-bottom="0cm"/>
    </style:style>
    <style:style style:name="P23" style:family="paragraph" style:parent-style-name="Text_20_body" style:list-style-name="L11">
      <style:paragraph-properties fo:margin-top="0cm" fo:margin-bottom="0cm"/>
    </style:style>
    <style:style style:name="P24" style:family="paragraph" style:parent-style-name="Text_20_body" style:list-style-name="L12">
      <style:paragraph-properties fo:margin-top="0cm" fo:margin-bottom="0cm"/>
    </style:style>
    <style:style style:name="P2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PIX Brazil Dashboard</text:h>
      <text:h text:style-name="Heading_20_2" text:outline-level="2">Power BI Business Intelligence Project</text:h>
      <text:h text:style-name="Heading_20_2" text:outline-level="2">1. Project Overview</text:h>
      <text:p text:style-name="Text_20_body">This project is an end-to-end Business Intelligence solution developed with Power BI to analyze the evolution of Brazil's PIX instant payment system.</text:p>
      <text:p text:style-name="Text_20_body">The objective is to understand the growth dynamics of PIX and identify whether the ecosystem is still expanding rapidly or moving toward a more mature stage.</text:p>
      <text:p text:style-name="Text_20_body">The project covers the complete BI workflow:</text:p>
      <text:list xml:id="list8943060955504035058" text:style-name="L1">
        <text:list-item>
          <text:p text:style-name="P13">Data extraction and transformation </text:p>
        </text:list-item>
        <text:list-item>
          <text:p text:style-name="P13">Data modeling </text:p>
        </text:list-item>
        <text:list-item>
          <text:p text:style-name="P13">KPI definition </text:p>
        </text:list-item>
        <text:list-item>
          <text:p text:style-name="P13">DAX calculations </text:p>
        </text:list-item>
        <text:list-item>
          <text:p text:style-name="P13">Interactive dashboard design </text:p>
        </text:list-item>
        <text:list-item>
          <text:p text:style-name="P1">Business insights generation </text:p>
        </text:list-item>
      </text:list>
      <text:p text:style-name="Horizontal_20_Line"/>
      <text:h text:style-name="Heading_20_1" text:outline-level="1">2. Business Context</text:h>
      <text:p text:style-name="Text_20_body">PIX became one of the most important payment methods in Brazil.</text:p>
      <text:p text:style-name="Text_20_body">This dashboard was created to answer key business questions:</text:p>
      <text:list xml:id="list7970012934359869716" text:style-name="L2">
        <text:list-item>
          <text:p text:style-name="P14">How has PIX evolved since its launch? </text:p>
        </text:list-item>
        <text:list-item>
          <text:p text:style-name="P14">Is transaction growth accelerating or stabilizing? </text:p>
        </text:list-item>
        <text:list-item>
          <text:p text:style-name="P14">Which institutions and regions represent the highest usage? </text:p>
        </text:list-item>
        <text:list-item>
          <text:p text:style-name="P2">How is the market moving toward maturity? </text:p>
        </text:list-item>
      </text:list>
      <text:p text:style-name="Horizontal_20_Line"/>
      <text:h text:style-name="Heading_20_1" text:outline-level="1">3. Data Source</text:h>
      <text:p text:style-name="Text_20_body">The project uses official public data provided by:</text:p>
      <text:p text:style-name="Text_20_body"><text:span text:style-name="Strong_20_Emphasis">Central Bank of Brazil (Banco Central do Brasil)</text:span></text:p>
      <text:p text:style-name="Text_20_body">Dataset:</text:p>
      <text:p text:style-name="Text_20_body">PIX Open Data</text:p>
      <text:p text:style-name="Text_20_body">The dataset contains information about:</text:p>
      <text:list xml:id="list7812864218371374392" text:style-name="L3">
        <text:list-item>
          <text:p text:style-name="P15">Transaction volume </text:p>
        </text:list-item>
        <text:list-item>
          <text:p text:style-name="P15">Financial values </text:p>
        </text:list-item>
        <text:list-item>
          <text:p text:style-name="P15">Participating institutions </text:p>
        </text:list-item>
        <text:list-item>
          <text:p text:style-name="P15">User characteristics </text:p>
        </text:list-item>
        <text:list-item>
          <text:p text:style-name="P3">Geographic distribution </text:p>
        </text:list-item>
      </text:list>
      <text:p text:style-name="Text_20_body"><text:soft-page-break/>The data was selected because it is:</text:p>
      <text:list xml:id="list499118187955253615" text:style-name="L4">
        <text:list-item>
          <text:p text:style-name="P16">Official </text:p>
        </text:list-item>
        <text:list-item>
          <text:p text:style-name="P16">Publicly available </text:p>
        </text:list-item>
        <text:list-item>
          <text:p text:style-name="P16">Reliable </text:p>
        </text:list-item>
        <text:list-item>
          <text:p text:style-name="P4">Relevant for real-world financial analysis </text:p>
        </text:list-item>
      </text:list>
      <text:p text:style-name="Horizontal_20_Line"/>
      <text:h text:style-name="Heading_20_1" text:outline-level="1">4. Data Preparation (ETL)</text:h>
      <text:p text:style-name="Text_20_body">The data preparation process included:</text:p>
      <text:h text:style-name="Heading_20_2" text:outline-level="2">Extraction</text:h>
      <text:p text:style-name="Text_20_body">Data was collected from the Central Bank of Brazil open data platform.</text:p>
      <text:p text:style-name="Text_20_body">Multiple datasets were analyzed before selecting the PIX dataset.</text:p>
      <text:h text:style-name="Heading_20_2" text:outline-level="2">Transformation</text:h>
      <text:p text:style-name="Text_20_body">The following transformations were applied:</text:p>
      <text:list xml:id="list6585408525630031211" text:style-name="L5">
        <text:list-item>
          <text:p text:style-name="P17">Data cleaning </text:p>
        </text:list-item>
        <text:list-item>
          <text:p text:style-name="P17">Column standardization </text:p>
        </text:list-item>
        <text:list-item>
          <text:p text:style-name="P17">Date format normalization </text:p>
        </text:list-item>
        <text:list-item>
          <text:p text:style-name="P17">Removal of unnecessary fields </text:p>
        </text:list-item>
        <text:list-item>
          <text:p text:style-name="P5">Preparation of analytical dimensions </text:p>
        </text:list-item>
      </text:list>
      <text:h text:style-name="Heading_20_2" text:outline-level="2">Data Modeling</text:h>
      <text:p text:style-name="Text_20_body">A Star Schema approach was implemented.</text:p>
      <text:p text:style-name="Text_20_body">Main components:</text:p>
      <text:h text:style-name="Heading_20_3" text:outline-level="3">Fact tables</text:h>
      <text:p text:style-name="Text_20_body">Containing transactional information.</text:p>
      <text:h text:style-name="Heading_20_3" text:outline-level="3">Dimension tables</text:h>
      <text:p text:style-name="Text_20_body">Including:</text:p>
      <text:list xml:id="list178144982707625917" text:style-name="L6">
        <text:list-item>
          <text:p text:style-name="P18">Calendar dimension </text:p>
        </text:list-item>
        <text:list-item>
          <text:p text:style-name="P18">Geographic information </text:p>
        </text:list-item>
        <text:list-item>
          <text:p text:style-name="P6">User segmentation </text:p>
        </text:list-item>
      </text:list>
      <text:p text:style-name="Text_20_body">A dedicated calendar table was created to support time-based analysis.</text:p>
      <text:p text:style-name="Horizontal_20_Line"/>
      <text:h text:style-name="Heading_20_1" text:outline-level="1"><text:soft-page-break/>5. Data Model</text:h>
      <text:p text:style-name="Text_20_body">The model was designed to improve:</text:p>
      <text:list xml:id="list3776748089523781443" text:style-name="L7">
        <text:list-item>
          <text:p text:style-name="P19">Performance </text:p>
        </text:list-item>
        <text:list-item>
          <text:p text:style-name="P19">Scalability </text:p>
        </text:list-item>
        <text:list-item>
          <text:p text:style-name="P19">Filtering behavior </text:p>
        </text:list-item>
        <text:list-item>
          <text:p text:style-name="P7">DAX calculations </text:p>
        </text:list-item>
      </text:list>
      <text:p text:style-name="Text_20_body">The calendar dimension enables advanced time intelligence calculations.</text:p>
      <text:p text:style-name="Horizontal_20_Line"/>
      <text:h text:style-name="Heading_20_1" text:outline-level="1">6. Key Metrics (DAX)</text:h>
      <text:p text:style-name="Text_20_body">The dashboard includes dynamic measures created with DAX.</text:p>
      <text:p text:style-name="Text_20_body">Main KPIs:</text:p>
      <text:h text:style-name="Heading_20_2" text:outline-level="2">Total PIX Value</text:h>
      <text:p text:style-name="Text_20_body">Measures the total financial volume processed.</text:p>
      <text:h text:style-name="Heading_20_2" text:outline-level="2">Number of Transactions</text:h>
      <text:p text:style-name="Text_20_body">Tracks the number of PIX operations.</text:p>
      <text:h text:style-name="Heading_20_2" text:outline-level="2">Financial Institutions</text:h>
      <text:p text:style-name="Text_20_body">Monitors the evolution of participating institutions.</text:p>
      <text:h text:style-name="Heading_20_2" text:outline-level="2">Year-over-Year Growth (YoY)</text:h>
      <text:p text:style-name="Text_20_body">Compares current performance with the same period from the previous year.</text:p>
      <text:p text:style-name="Text_20_body">Purpose:</text:p>
      <text:p text:style-name="Text_20_body">Identify long-term structural growth.</text:p>
      <text:h text:style-name="Heading_20_2" text:outline-level="2">Month-over-Month Growth (MoM)</text:h>
      <text:p text:style-name="Text_20_body">Compares the current month with the previous month.</text:p>
      <text:p text:style-name="Text_20_body">Purpose:</text:p>
      <text:p text:style-name="Text_20_body">Analyze short-term variations and trends.</text:p>
      <text:p text:style-name="Horizontal_20_Line"/>
      <text:h text:style-name="Heading_20_1" text:outline-level="1">7. Dashboard Design</text:h>
      <text:p text:style-name="Text_20_body">The dashboard was designed using data storytelling principles.</text:p>
      <text:p text:style-name="Text_20_body">Main design decisions:</text:p>
      <text:h text:style-name="Heading_20_2" text:outline-level="2"><text:soft-page-break/>Overview Page</text:h>
      <text:p text:style-name="Text_20_body">Provides a high-level view with:</text:p>
      <text:list xml:id="list3146189541433896880" text:style-name="L8">
        <text:list-item>
          <text:p text:style-name="P20">Main KPIs </text:p>
        </text:list-item>
        <text:list-item>
          <text:p text:style-name="P20">Growth indicators </text:p>
        </text:list-item>
        <text:list-item>
          <text:p text:style-name="P8">Market evolution </text:p>
        </text:list-item>
      </text:list>
      <text:h text:style-name="Heading_20_2" text:outline-level="2">Analytical Page</text:h>
      <text:p text:style-name="Text_20_body">Focuses on:</text:p>
      <text:list xml:id="list80617602423356162" text:style-name="L9">
        <text:list-item>
          <text:p text:style-name="P21">Trends over time </text:p>
        </text:list-item>
        <text:list-item>
          <text:p text:style-name="P21">Market maturity </text:p>
        </text:list-item>
        <text:list-item>
          <text:p text:style-name="P9">Regional and institutional analysis </text:p>
        </text:list-item>
      </text:list>
      <text:h text:style-name="Heading_20_2" text:outline-level="2">Detail Page</text:h>
      <text:p text:style-name="Text_20_body">Allows deeper exploration through:</text:p>
      <text:list xml:id="list7243562900030966259" text:style-name="L10">
        <text:list-item>
          <text:p text:style-name="P22">Drill-through navigation </text:p>
        </text:list-item>
        <text:list-item>
          <text:p text:style-name="P22">Interactive filtering </text:p>
        </text:list-item>
        <text:list-item>
          <text:p text:style-name="P10">Detailed analysis </text:p>
        </text:list-item>
      </text:list>
      <text:p text:style-name="Horizontal_20_Line"/>
      <text:h text:style-name="Heading_20_1" text:outline-level="1">8. Dashboard Features</text:h>
      <text:p text:style-name="Text_20_body">Implemented features:</text:p>
      <text:p text:style-name="Text_20_body">✔ Interactive KPI cards<text:line-break/>✔ Dynamic filters<text:line-break/>✔ Drill-through navigation<text:line-break/>✔ Custom tooltips<text:line-break/>✔ Dynamic titles<text:line-break/>✔ Page navigation<text:line-break/>✔ Filter reset button<text:line-break/>✔ Responsive mobile layout</text:p>
      <text:p text:style-name="Horizontal_20_Line"/>
      <text:h text:style-name="Heading_20_1" text:outline-level="1">9. Main Insights</text:h>
      <text:p text:style-name="Text_20_body">The analysis highlights:</text:p>
      <text:list xml:id="list8948713660603533628" text:style-name="L11">
        <text:list-item>
          <text:p text:style-name="P23">PIX continues to show strong structural growth. </text:p>
        </text:list-item>
        <text:list-item>
          <text:p text:style-name="P23">Growth rates indicate a gradual stabilization of the ecosystem. </text:p>
        </text:list-item>
        <text:list-item>
          <text:p text:style-name="P23">The system appears to be moving from rapid expansion toward maturity. </text:p>
        </text:list-item>
        <text:list-item>
          <text:p text:style-name="P11">Transaction concentration remains higher among major institutions and developed regions. </text:p>
        </text:list-item>
      </text:list>
      <text:p text:style-name="Horizontal_20_Line"/>
      <text:h text:style-name="Heading_20_1" text:outline-level="1"><text:soft-page-break/>10. Skills Demonstrated</text:h>
      <text:p text:style-name="Text_20_body">This project demonstrates practical skills in:</text:p>
      <text:list xml:id="list5416964481120197676" text:style-name="L12">
        <text:list-item>
          <text:p text:style-name="P24">Business Intelligence </text:p>
        </text:list-item>
        <text:list-item>
          <text:p text:style-name="P24">Power BI Development </text:p>
        </text:list-item>
        <text:list-item>
          <text:p text:style-name="P24">Data Modeling </text:p>
        </text:list-item>
        <text:list-item>
          <text:p text:style-name="P24">ETL Process </text:p>
        </text:list-item>
        <text:list-item>
          <text:p text:style-name="P24">DAX </text:p>
        </text:list-item>
        <text:list-item>
          <text:p text:style-name="P24">Data Visualization </text:p>
        </text:list-item>
        <text:list-item>
          <text:p text:style-name="P24">Dashboard UX Design </text:p>
        </text:list-item>
        <text:list-item>
          <text:p text:style-name="P24">Business Analysis </text:p>
        </text:list-item>
        <text:list-item>
          <text:p text:style-name="P12">Data Storytelling </text:p>
        </text:list-item>
      </text:list>
      <text:p text:style-name="Horizontal_20_Line"/>
      <text:h text:style-name="Heading_20_1" text:outline-level="1">Author</text:h>
      <text:p text:style-name="Text_20_body">Mélanie D'Elia | Business Analyst | Power BI Enthusiast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4S</meta:editing-duration>
    <meta:editing-cycles>3</meta:editing-cycles>
    <meta:generator>OpenOffice/4.1.15$Win32 OpenOffice.org_project/4115m2$Build-9813</meta:generator>
    <dc:date>2026-07-01T16:24:35.36</dc:date>
    <meta:document-statistic meta:table-count="0" meta:image-count="0" meta:object-count="0" meta:page-count="5" meta:paragraph-count="122" meta:word-count="590" meta:character-count="3947"/>
    <meta:user-defined meta:name="Info 1"/>
    <meta:user-defined meta:name="Info 2"/>
    <meta:user-defined meta:name="Info 3"/>
    <meta:user-defined meta:name="Info 4"/>
  </office:meta>
</office:document-meta>
</file>